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2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2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2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2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2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2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2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2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2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2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4" style:parent-style-name="Normal" style:family="paragraph">
      <style:paragraph-properties fo:text-align="center"/>
      <style:text-properties fo:font-weight="bold" style:font-weight-asian="bold" style:font-weight-complex="bold" fo:font-size="6pt" style:font-size-asian="6pt" style:font-size-complex="6pt"/>
    </style:style>
    <style:style style:name="P55" style:parent-style-name="Normal" style:family="paragraph">
      <style:paragraph-properties fo:text-align="center"/>
      <style:text-properties fo:font-weight="bold" style:font-weight-asian="bold" style:font-weight-complex="bold" fo:font-size="6pt" style:font-size-asian="6pt" style:font-size-complex="6pt"/>
    </style:style>
    <style:style style:name="P56" style:parent-style-name="Normal" style:family="paragraph">
      <style:paragraph-properties fo:text-align="center"/>
      <style:text-properties fo:font-weight="bold" style:font-weight-asian="bold" style:font-weight-complex="bold" fo:font-size="6pt" style:font-size-asian="6pt" style:font-size-complex="6pt"/>
    </style:style>
    <style:style style:name="P57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5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7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7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7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7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7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7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7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7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7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7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8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8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8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8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8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8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8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8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8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8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9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9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9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9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9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9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9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9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9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9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0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0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0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0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0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0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0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0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0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0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1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1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1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1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1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1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1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1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1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1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2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2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2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2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2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2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2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2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2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2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3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3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3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3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3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3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3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3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3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3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4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4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4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4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4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4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4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4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4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4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5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5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5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5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5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5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5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5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5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5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6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6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6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6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6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6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6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6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6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6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7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7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7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7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7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7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7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7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7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7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8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8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8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8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8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8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8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8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8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8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9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9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9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9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194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95" style:parent-style-name="Normal" style:family="paragraph">
      <style:text-properties fo:font-size="6pt" style:font-size-asian="6pt" style:font-size-complex="6pt"/>
    </style:style>
    <style:style style:name="P196" style:parent-style-name="Normal" style:family="paragraph">
      <style:text-properties fo:font-size="6pt" style:font-size-asian="6pt" style:font-size-complex="6pt"/>
    </style:style>
    <style:style style:name="P197" style:parent-style-name="Normal" style:family="paragraph">
      <style:text-properties fo:font-size="6pt" style:font-size-asian="6pt" style:font-size-complex="6pt"/>
    </style:style>
    <style:style style:name="P198" style:parent-style-name="Normal" style:family="paragraph">
      <style:text-properties fo:font-size="6pt" style:font-size-asian="6pt" style:font-size-complex="6pt"/>
    </style:style>
    <style:style style:name="P199" style:parent-style-name="Normal" style:family="paragraph">
      <style:text-properties fo:font-size="6pt" style:font-size-asian="6pt" style:font-size-complex="6pt"/>
    </style:style>
    <style:style style:name="P200" style:parent-style-name="Normal" style:family="paragraph">
      <style:text-properties fo:font-size="6pt" style:font-size-asian="6pt" style:font-size-complex="6pt"/>
    </style:style>
    <style:style style:name="P201" style:parent-style-name="Normal" style:family="paragraph">
      <style:text-properties fo:font-size="6pt" style:font-size-asian="6pt" style:font-size-complex="6pt"/>
    </style:style>
    <style:style style:name="P202" style:parent-style-name="Normal" style:family="paragraph">
      <style:text-properties fo:font-size="6pt" style:font-size-asian="6pt" style:font-size-complex="6pt"/>
    </style:style>
    <style:style style:name="P203" style:parent-style-name="Normal" style:family="paragraph">
      <style:text-properties fo:font-size="6pt" style:font-size-asian="6pt" style:font-size-complex="6pt"/>
    </style:style>
    <style:style style:name="P204" style:parent-style-name="Normal" style:family="paragraph">
      <style:text-properties fo:font-size="6pt" style:font-size-asian="6pt" style:font-size-complex="6pt"/>
    </style:style>
    <style:style style:name="P205" style:parent-style-name="Normal" style:family="paragraph">
      <style:text-properties fo:font-size="6pt" style:font-size-asian="6pt" style:font-size-complex="6pt"/>
    </style:style>
    <style:style style:name="P206" style:parent-style-name="Normal" style:family="paragraph">
      <style:text-properties fo:font-size="6pt" style:font-size-asian="6pt" style:font-size-complex="6pt"/>
    </style:style>
    <style:style style:name="P207" style:parent-style-name="Normal" style:family="paragraph">
      <style:text-properties fo:font-size="6pt" style:font-size-asian="6pt" style:font-size-complex="6pt"/>
    </style:style>
    <style:style style:name="P208" style:parent-style-name="Normal" style:family="paragraph">
      <style:text-properties fo:font-size="6pt" style:font-size-asian="6pt" style:font-size-complex="6pt"/>
    </style:style>
    <style:style style:name="P209" style:parent-style-name="Normal" style:family="paragraph">
      <style:text-properties fo:font-size="6pt" style:font-size-asian="6pt" style:font-size-complex="6pt"/>
    </style:style>
    <style:style style:name="P210" style:parent-style-name="Normal" style:family="paragraph">
      <style:text-properties fo:font-size="6pt" style:font-size-asian="6pt" style:font-size-complex="6pt"/>
    </style:style>
    <style:style style:name="P211" style:parent-style-name="Normal" style:family="paragraph">
      <style:text-properties fo:font-size="6pt" style:font-size-asian="6pt" style:font-size-complex="6pt"/>
    </style:style>
    <style:style style:name="P212" style:parent-style-name="Normal" style:family="paragraph">
      <style:text-properties fo:font-size="6pt" style:font-size-asian="6pt" style:font-size-complex="6pt"/>
    </style:style>
    <style:style style:name="P213" style:parent-style-name="Normal" style:family="paragraph">
      <style:text-properties fo:font-size="6pt" style:font-size-asian="6pt" style:font-size-complex="6pt"/>
    </style:style>
    <style:style style:name="P214" style:parent-style-name="Normal" style:family="paragraph">
      <style:text-properties fo:font-size="6pt" style:font-size-asian="6pt" style:font-size-complex="6pt"/>
    </style:style>
    <style:style style:name="P215" style:parent-style-name="Normal" style:family="paragraph">
      <style:text-properties fo:font-size="6pt" style:font-size-asian="6pt" style:font-size-complex="6pt"/>
    </style:style>
    <style:style style:name="P216" style:parent-style-name="Normal" style:family="paragraph">
      <style:text-properties fo:font-size="6pt" style:font-size-asian="6pt" style:font-size-complex="6pt"/>
    </style:style>
    <style:style style:name="P217" style:parent-style-name="Normal" style:family="paragraph">
      <style:text-properties fo:font-size="6pt" style:font-size-asian="6pt" style:font-size-complex="6pt"/>
    </style:style>
    <style:style style:name="P218" style:parent-style-name="Normal" style:family="paragraph">
      <style:text-properties fo:font-size="6pt" style:font-size-asian="6pt" style:font-size-complex="6pt"/>
    </style:style>
    <style:style style:name="P219" style:parent-style-name="Normal" style:family="paragraph">
      <style:text-properties fo:font-size="6pt" style:font-size-asian="6pt" style:font-size-complex="6pt"/>
    </style:style>
    <style:style style:name="P220" style:parent-style-name="Normal" style:family="paragraph">
      <style:text-properties fo:font-size="6pt" style:font-size-asian="6pt" style:font-size-complex="6pt"/>
    </style:style>
    <style:style style:name="P221" style:parent-style-name="Normal" style:family="paragraph">
      <style:text-properties fo:font-size="6pt" style:font-size-asian="6pt" style:font-size-complex="6pt"/>
    </style:style>
    <style:style style:name="P222" style:parent-style-name="Normal" style:family="paragraph">
      <style:text-properties fo:font-size="6pt" style:font-size-asian="6pt" style:font-size-complex="6pt"/>
    </style:style>
    <style:style style:name="P223" style:parent-style-name="Normal" style:family="paragraph">
      <style:text-properties fo:font-size="6pt" style:font-size-asian="6pt" style:font-size-complex="6pt"/>
    </style:style>
    <style:style style:name="P224" style:parent-style-name="Normal" style:family="paragraph">
      <style:text-properties fo:font-size="6pt" style:font-size-asian="6pt" style:font-size-complex="6pt"/>
    </style:style>
    <style:style style:name="P225" style:parent-style-name="Normal" style:family="paragraph">
      <style:text-properties fo:font-size="6pt" style:font-size-asian="6pt" style:font-size-complex="6pt"/>
    </style:style>
    <style:style style:name="P226" style:parent-style-name="Normal" style:family="paragraph">
      <style:text-properties fo:font-size="6pt" style:font-size-asian="6pt" style:font-size-complex="6pt"/>
    </style:style>
    <style:style style:name="P227" style:parent-style-name="Normal" style:family="paragraph">
      <style:text-properties fo:font-size="6pt" style:font-size-asian="6pt" style:font-size-complex="6pt"/>
    </style:style>
    <style:style style:name="P228" style:parent-style-name="Normal" style:family="paragraph">
      <style:text-properties fo:font-size="6pt" style:font-size-asian="6pt" style:font-size-complex="6pt"/>
    </style:style>
    <style:style style:name="P229" style:parent-style-name="Normal" style:family="paragraph">
      <style:text-properties fo:font-size="6pt" style:font-size-asian="6pt" style:font-size-complex="6pt"/>
    </style:style>
    <style:style style:name="P230" style:parent-style-name="Normal" style:family="paragraph">
      <style:text-properties fo:font-size="6pt" style:font-size-asian="6pt" style:font-size-complex="6pt"/>
    </style:style>
    <style:style style:name="P231" style:parent-style-name="Normal" style:family="paragraph">
      <style:text-properties fo:font-size="6pt" style:font-size-asian="6pt" style:font-size-complex="6pt"/>
    </style:style>
    <style:style style:name="P232" style:parent-style-name="Normal" style:family="paragraph">
      <style:text-properties fo:font-size="6pt" style:font-size-asian="6pt" style:font-size-complex="6pt"/>
    </style:style>
    <style:style style:name="P233" style:parent-style-name="Normal" style:family="paragraph">
      <style:text-properties fo:font-size="6pt" style:font-size-asian="6pt" style:font-size-complex="6pt"/>
    </style:style>
    <style:style style:name="P234" style:parent-style-name="Normal" style:family="paragraph">
      <style:text-properties fo:font-size="6pt" style:font-size-asian="6pt" style:font-size-complex="6pt"/>
    </style:style>
    <style:style style:name="P235" style:parent-style-name="Normal" style:family="paragraph">
      <style:text-properties fo:font-size="6pt" style:font-size-asian="6pt" style:font-size-complex="6pt"/>
    </style:style>
    <style:style style:name="P236" style:parent-style-name="Normal" style:family="paragraph">
      <style:text-properties fo:font-size="6pt" style:font-size-asian="6pt" style:font-size-complex="6pt"/>
    </style:style>
    <style:style style:name="P237" style:parent-style-name="Normal" style:family="paragraph">
      <style:text-properties fo:font-size="6pt" style:font-size-asian="6pt" style:font-size-complex="6pt"/>
    </style:style>
    <style:style style:name="P238" style:parent-style-name="Normal" style:family="paragraph">
      <style:text-properties fo:font-size="6pt" style:font-size-asian="6pt" style:font-size-complex="6pt"/>
    </style:style>
    <style:style style:name="P239" style:parent-style-name="Normal" style:family="paragraph">
      <style:text-properties fo:font-size="6pt" style:font-size-asian="6pt" style:font-size-complex="6pt"/>
    </style:style>
    <style:style style:name="P240" style:parent-style-name="Normal" style:family="paragraph">
      <style:text-properties fo:font-size="6pt" style:font-size-asian="6pt" style:font-size-complex="6pt"/>
    </style:style>
    <style:style style:name="P241" style:parent-style-name="Normal" style:family="paragraph">
      <style:text-properties fo:font-size="6pt" style:font-size-asian="6pt" style:font-size-complex="6pt"/>
    </style:style>
    <style:style style:name="P242" style:parent-style-name="Normal" style:family="paragraph">
      <style:text-properties fo:font-size="6pt" style:font-size-asian="6pt" style:font-size-complex="6pt"/>
    </style:style>
    <style:style style:name="P243" style:parent-style-name="Normal" style:family="paragraph">
      <style:text-properties fo:font-size="6pt" style:font-size-asian="6pt" style:font-size-complex="6pt"/>
    </style:style>
    <style:style style:name="P244" style:parent-style-name="Normal" style:family="paragraph">
      <style:text-properties fo:font-size="6pt" style:font-size-asian="6pt" style:font-size-complex="6pt"/>
    </style:style>
    <style:style style:name="P245" style:parent-style-name="Normal" style:family="paragraph">
      <style:text-properties fo:font-size="6pt" style:font-size-asian="6pt" style:font-size-complex="6pt"/>
    </style:style>
    <style:style style:name="P246" style:parent-style-name="Normal" style:family="paragraph">
      <style:text-properties fo:font-size="6pt" style:font-size-asian="6pt" style:font-size-complex="6pt"/>
    </style:style>
    <style:style style:name="P247" style:parent-style-name="Normal" style:family="paragraph">
      <style:text-properties fo:font-size="6pt" style:font-size-asian="6pt" style:font-size-complex="6pt"/>
    </style:style>
    <style:style style:name="P248" style:parent-style-name="Normal" style:family="paragraph">
      <style:text-properties fo:font-size="6pt" style:font-size-asian="6pt" style:font-size-complex="6pt"/>
    </style:style>
    <style:style style:name="P249" style:parent-style-name="Normal" style:family="paragraph">
      <style:text-properties fo:font-size="6pt" style:font-size-asian="6pt" style:font-size-complex="6pt"/>
    </style:style>
    <style:style style:name="P250" style:parent-style-name="Normal" style:family="paragraph">
      <style:text-properties fo:font-size="6pt" style:font-size-asian="6pt" style:font-size-complex="6pt"/>
    </style:style>
    <style:style style:name="P251" style:parent-style-name="Normal" style:family="paragraph">
      <style:text-properties fo:font-size="6pt" style:font-size-asian="6pt" style:font-size-complex="6pt"/>
    </style:style>
    <style:style style:name="P252" style:parent-style-name="Normal" style:family="paragraph">
      <style:text-properties fo:font-size="6pt" style:font-size-asian="6pt" style:font-size-complex="6pt"/>
    </style:style>
    <style:style style:name="P253" style:parent-style-name="Normal" style:family="paragraph">
      <style:text-properties fo:font-size="6pt" style:font-size-asian="6pt" style:font-size-complex="6pt"/>
    </style:style>
    <style:style style:name="P254" style:parent-style-name="Normal" style:family="paragraph">
      <style:text-properties fo:font-size="6pt" style:font-size-asian="6pt" style:font-size-complex="6pt"/>
    </style:style>
    <style:style style:name="P255" style:parent-style-name="Normal" style:family="paragraph">
      <style:text-properties fo:font-size="6pt" style:font-size-asian="6pt" style:font-size-complex="6pt"/>
    </style:style>
    <style:style style:name="P256" style:parent-style-name="Normal" style:family="paragraph">
      <style:text-properties fo:font-size="6pt" style:font-size-asian="6pt" style:font-size-complex="6pt"/>
    </style:style>
    <style:style style:name="P257" style:parent-style-name="Normal" style:family="paragraph">
      <style:text-properties fo:font-size="6pt" style:font-size-asian="6pt" style:font-size-complex="6pt"/>
    </style:style>
    <style:style style:name="P258" style:parent-style-name="Normal" style:family="paragraph">
      <style:text-properties fo:font-size="6pt" style:font-size-asian="6pt" style:font-size-complex="6pt"/>
    </style:style>
    <style:style style:name="P259" style:parent-style-name="Normal" style:family="paragraph">
      <style:text-properties fo:font-size="6pt" style:font-size-asian="6pt" style:font-size-complex="6pt"/>
    </style:style>
    <style:style style:name="P260" style:parent-style-name="Normal" style:family="paragraph">
      <style:text-properties fo:font-size="6pt" style:font-size-asian="6pt" style:font-size-complex="6pt"/>
    </style:style>
    <style:style style:name="P261" style:parent-style-name="Normal" style:family="paragraph">
      <style:text-properties fo:font-size="6pt" style:font-size-asian="6pt" style:font-size-complex="6pt"/>
    </style:style>
    <style:style style:name="P262" style:parent-style-name="Normal" style:family="paragraph">
      <style:text-properties fo:font-size="6pt" style:font-size-asian="6pt" style:font-size-complex="6pt"/>
    </style:style>
    <style:style style:name="P263" style:parent-style-name="Normal" style:family="paragraph">
      <style:text-properties fo:font-size="6pt" style:font-size-asian="6pt" style:font-size-complex="6pt"/>
    </style:style>
    <style:style style:name="P264" style:parent-style-name="Normal" style:family="paragraph">
      <style:text-properties fo:font-size="6pt" style:font-size-asian="6pt" style:font-size-complex="6pt"/>
    </style:style>
    <style:style style:name="P265" style:parent-style-name="Normal" style:family="paragraph">
      <style:text-properties fo:font-size="6pt" style:font-size-asian="6pt" style:font-size-complex="6pt"/>
    </style:style>
    <style:style style:name="P266" style:parent-style-name="Normal" style:family="paragraph">
      <style:text-properties fo:font-size="6pt" style:font-size-asian="6pt" style:font-size-complex="6pt"/>
    </style:style>
    <style:style style:name="P267" style:parent-style-name="Normal" style:family="paragraph">
      <style:text-properties fo:font-size="6pt" style:font-size-asian="6pt" style:font-size-complex="6pt"/>
    </style:style>
    <style:style style:name="P268" style:parent-style-name="Normal" style:family="paragraph">
      <style:text-properties fo:font-size="6pt" style:font-size-asian="6pt" style:font-size-complex="6pt"/>
    </style:style>
    <style:style style:name="P269" style:parent-style-name="Normal" style:family="paragraph">
      <style:text-properties fo:font-size="6pt" style:font-size-asian="6pt" style:font-size-complex="6pt"/>
    </style:style>
    <style:style style:name="P270" style:parent-style-name="Normal" style:family="paragraph">
      <style:text-properties fo:font-size="6pt" style:font-size-asian="6pt" style:font-size-complex="6pt"/>
    </style:style>
    <style:style style:name="P271" style:parent-style-name="Normal" style:family="paragraph">
      <style:text-properties fo:font-size="6pt" style:font-size-asian="6pt" style:font-size-complex="6pt"/>
    </style:style>
    <style:style style:name="P272" style:parent-style-name="Normal" style:family="paragraph">
      <style:text-properties fo:font-size="6pt" style:font-size-asian="6pt" style:font-size-complex="6pt"/>
    </style:style>
    <style:style style:name="P273" style:parent-style-name="Normal" style:family="paragraph">
      <style:text-properties fo:font-size="6pt" style:font-size-asian="6pt" style:font-size-complex="6pt"/>
    </style:style>
    <style:style style:name="P274" style:parent-style-name="Normal" style:family="paragraph">
      <style:text-properties fo:font-size="6pt" style:font-size-asian="6pt" style:font-size-complex="6pt"/>
    </style:style>
    <style:style style:name="P275" style:parent-style-name="Normal" style:family="paragraph">
      <style:text-properties fo:font-size="6pt" style:font-size-asian="6pt" style:font-size-complex="6pt"/>
    </style:style>
    <style:style style:name="P276" style:parent-style-name="Normal" style:family="paragraph">
      <style:text-properties fo:font-size="6pt" style:font-size-asian="6pt" style:font-size-complex="6pt"/>
    </style:style>
    <style:style style:name="P277" style:parent-style-name="Normal" style:family="paragraph">
      <style:text-properties fo:font-size="6pt" style:font-size-asian="6pt" style:font-size-complex="6pt"/>
    </style:style>
    <style:style style:name="P278" style:parent-style-name="Normal" style:family="paragraph">
      <style:text-properties fo:font-size="6pt" style:font-size-asian="6pt" style:font-size-complex="6pt"/>
    </style:style>
    <style:style style:name="P279" style:parent-style-name="Normal" style:family="paragraph">
      <style:text-properties fo:font-size="6pt" style:font-size-asian="6pt" style:font-size-complex="6pt"/>
    </style:style>
    <style:style style:name="P280" style:parent-style-name="Normal" style:family="paragraph">
      <style:text-properties fo:font-size="6pt" style:font-size-asian="6pt" style:font-size-complex="6pt"/>
    </style:style>
    <style:style style:name="P281" style:parent-style-name="Normal" style:family="paragraph">
      <style:text-properties fo:font-size="6pt" style:font-size-asian="6pt" style:font-size-complex="6pt"/>
    </style:style>
    <style:style style:name="P282" style:parent-style-name="Normal" style:family="paragraph">
      <style:text-properties fo:font-size="6pt" style:font-size-asian="6pt" style:font-size-complex="6pt"/>
    </style:style>
    <style:style style:name="P283" style:parent-style-name="Normal" style:family="paragraph">
      <style:text-properties fo:font-size="6pt" style:font-size-asian="6pt" style:font-size-complex="6pt"/>
    </style:style>
    <style:style style:name="P284" style:parent-style-name="Normal" style:family="paragraph">
      <style:text-properties fo:font-size="6pt" style:font-size-asian="6pt" style:font-size-complex="6pt"/>
    </style:style>
    <style:style style:name="P285" style:parent-style-name="Normal" style:family="paragraph">
      <style:text-properties fo:font-size="6pt" style:font-size-asian="6pt" style:font-size-complex="6pt"/>
    </style:style>
    <style:style style:name="P286" style:parent-style-name="Normal" style:family="paragraph">
      <style:text-properties fo:font-size="6pt" style:font-size-asian="6pt" style:font-size-complex="6pt"/>
    </style:style>
    <style:style style:name="P287" style:parent-style-name="Normal" style:family="paragraph">
      <style:text-properties fo:font-size="6pt" style:font-size-asian="6pt" style:font-size-complex="6pt"/>
    </style:style>
    <style:style style:name="P288" style:parent-style-name="Normal" style:family="paragraph">
      <style:text-properties fo:font-size="6pt" style:font-size-asian="6pt" style:font-size-complex="6pt"/>
    </style:style>
    <style:style style:name="P289" style:parent-style-name="Normal" style:family="paragraph">
      <style:text-properties fo:font-size="6pt" style:font-size-asian="6pt" style:font-size-complex="6pt"/>
    </style:style>
    <style:style style:name="P290" style:parent-style-name="Normal" style:family="paragraph">
      <style:text-properties fo:font-size="6pt" style:font-size-asian="6pt" style:font-size-complex="6pt"/>
    </style:style>
    <style:style style:name="P291" style:parent-style-name="Normal" style:family="paragraph">
      <style:text-properties fo:font-size="6pt" style:font-size-asian="6pt" style:font-size-complex="6pt"/>
    </style:style>
    <style:style style:name="P292" style:parent-style-name="Normal" style:family="paragraph">
      <style:text-properties fo:font-size="6pt" style:font-size-asian="6pt" style:font-size-complex="6pt"/>
    </style:style>
    <style:style style:name="P293" style:parent-style-name="Normal" style:family="paragraph">
      <style:text-properties fo:font-size="6pt" style:font-size-asian="6pt" style:font-size-complex="6pt"/>
    </style:style>
    <style:style style:name="P294" style:parent-style-name="Normal" style:family="paragraph">
      <style:text-properties fo:font-size="6pt" style:font-size-asian="6pt" style:font-size-complex="6pt"/>
    </style:style>
    <style:style style:name="P295" style:parent-style-name="Normal" style:family="paragraph">
      <style:text-properties fo:font-size="6pt" style:font-size-asian="6pt" style:font-size-complex="6pt"/>
    </style:style>
    <style:style style:name="P296" style:parent-style-name="Normal" style:family="paragraph">
      <style:text-properties fo:font-size="6pt" style:font-size-asian="6pt" style:font-size-complex="6pt"/>
    </style:style>
    <style:style style:name="P297" style:parent-style-name="Normal" style:family="paragraph">
      <style:text-properties fo:font-size="6pt" style:font-size-asian="6pt" style:font-size-complex="6pt"/>
    </style:style>
    <style:style style:name="P298" style:parent-style-name="Normal" style:family="paragraph">
      <style:text-properties fo:font-size="6pt" style:font-size-asian="6pt" style:font-size-complex="6pt"/>
    </style:style>
    <style:style style:name="P299" style:parent-style-name="Normal" style:family="paragraph">
      <style:text-properties fo:font-size="6pt" style:font-size-asian="6pt" style:font-size-complex="6pt"/>
    </style:style>
    <style:style style:name="P300" style:parent-style-name="Normal" style:family="paragraph">
      <style:text-properties fo:font-size="6pt" style:font-size-asian="6pt" style:font-size-complex="6pt"/>
    </style:style>
    <style:style style:name="P301" style:parent-style-name="Normal" style:family="paragraph">
      <style:text-properties fo:font-size="6pt" style:font-size-asian="6pt" style:font-size-complex="6pt"/>
    </style:style>
    <style:style style:name="P302" style:parent-style-name="Normal" style:family="paragraph">
      <style:text-properties fo:font-size="6pt" style:font-size-asian="6pt" style:font-size-complex="6pt"/>
    </style:style>
    <style:style style:name="P303" style:parent-style-name="Normal" style:family="paragraph">
      <style:text-properties fo:font-size="6pt" style:font-size-asian="6pt" style:font-size-complex="6pt"/>
    </style:style>
    <style:style style:name="P304" style:parent-style-name="Normal" style:family="paragraph">
      <style:text-properties fo:font-size="6pt" style:font-size-asian="6pt" style:font-size-complex="6pt"/>
    </style:style>
    <style:style style:name="P305" style:parent-style-name="Normal" style:family="paragraph">
      <style:text-properties fo:font-size="6pt" style:font-size-asian="6pt" style:font-size-complex="6pt"/>
    </style:style>
    <style:style style:name="P306" style:parent-style-name="Normal" style:family="paragraph">
      <style:text-properties fo:font-size="6pt" style:font-size-asian="6pt" style:font-size-complex="6pt"/>
    </style:style>
    <style:style style:name="P307" style:parent-style-name="Normal" style:family="paragraph">
      <style:text-properties fo:font-size="6pt" style:font-size-asian="6pt" style:font-size-complex="6pt"/>
    </style:style>
    <style:style style:name="P308" style:parent-style-name="Normal" style:family="paragraph">
      <style:text-properties fo:font-size="6pt" style:font-size-asian="6pt" style:font-size-complex="6pt"/>
    </style:style>
    <style:style style:name="P309" style:parent-style-name="Normal" style:family="paragraph">
      <style:text-properties fo:font-size="6pt" style:font-size-asian="6pt" style:font-size-complex="6pt"/>
    </style:style>
    <style:style style:name="P310" style:parent-style-name="Normal" style:family="paragraph">
      <style:text-properties fo:font-size="6pt" style:font-size-asian="6pt" style:font-size-complex="6pt"/>
    </style:style>
    <style:style style:name="P311" style:parent-style-name="Normal" style:family="paragraph">
      <style:text-properties fo:font-size="6pt" style:font-size-asian="6pt" style:font-size-complex="6pt"/>
    </style:style>
    <style:style style:name="P312" style:parent-style-name="Normal" style:family="paragraph">
      <style:text-properties fo:font-size="6pt" style:font-size-asian="6pt" style:font-size-complex="6pt"/>
    </style:style>
    <style:style style:name="P313" style:parent-style-name="Normal" style:family="paragraph">
      <style:text-properties fo:font-size="6pt" style:font-size-asian="6pt" style:font-size-complex="6pt"/>
    </style:style>
    <style:style style:name="P314" style:parent-style-name="Normal" style:family="paragraph">
      <style:text-properties fo:font-size="6pt" style:font-size-asian="6pt" style:font-size-complex="6pt"/>
    </style:style>
    <style:style style:name="P315" style:parent-style-name="Normal" style:family="paragraph">
      <style:text-properties fo:font-size="6pt" style:font-size-asian="6pt" style:font-size-complex="6pt"/>
    </style:style>
    <style:style style:name="P316" style:parent-style-name="Normal" style:family="paragraph">
      <style:text-properties fo:font-size="6pt" style:font-size-asian="6pt" style:font-size-complex="6pt"/>
    </style:style>
    <style:style style:name="P317" style:parent-style-name="Normal" style:family="paragraph">
      <style:text-properties fo:font-size="6pt" style:font-size-asian="6pt" style:font-size-complex="6pt"/>
    </style:style>
    <style:style style:name="P318" style:parent-style-name="Normal" style:family="paragraph">
      <style:text-properties fo:font-size="6pt" style:font-size-asian="6pt" style:font-size-complex="6pt"/>
    </style:style>
    <style:style style:name="P319" style:parent-style-name="Normal" style:family="paragraph">
      <style:text-properties fo:font-size="6pt" style:font-size-asian="6pt" style:font-size-complex="6pt"/>
    </style:style>
    <style:style style:name="P320" style:parent-style-name="Normal" style:family="paragraph">
      <style:text-properties fo:font-size="6pt" style:font-size-asian="6pt" style:font-size-complex="6pt"/>
    </style:style>
    <style:style style:name="P321" style:parent-style-name="Normal" style:family="paragraph">
      <style:text-properties fo:font-size="6pt" style:font-size-asian="6pt" style:font-size-complex="6pt"/>
    </style:style>
    <style:style style:name="P322" style:parent-style-name="Normal" style:family="paragraph">
      <style:text-properties fo:font-size="6pt" style:font-size-asian="6pt" style:font-size-complex="6pt"/>
    </style:style>
    <style:style style:name="P323" style:parent-style-name="Normal" style:family="paragraph">
      <style:text-properties fo:font-size="6pt" style:font-size-asian="6pt" style:font-size-complex="6pt"/>
    </style:style>
    <style:style style:name="P324" style:parent-style-name="Normal" style:family="paragraph">
      <style:text-properties fo:font-size="6pt" style:font-size-asian="6pt" style:font-size-complex="6pt"/>
    </style:style>
    <style:style style:name="P325" style:parent-style-name="Normal" style:family="paragraph">
      <style:text-properties fo:font-size="6pt" style:font-size-asian="6pt" style:font-size-complex="6pt"/>
    </style:style>
    <style:style style:name="P326" style:parent-style-name="Normal" style:family="paragraph">
      <style:text-properties fo:font-size="6pt" style:font-size-asian="6pt" style:font-size-complex="6pt"/>
    </style:style>
    <style:style style:name="P327" style:parent-style-name="Normal" style:family="paragraph">
      <style:text-properties fo:font-size="6pt" style:font-size-asian="6pt" style:font-size-complex="6pt"/>
    </style:style>
    <style:style style:name="P328" style:parent-style-name="Normal" style:family="paragraph">
      <style:text-properties fo:font-size="6pt" style:font-size-asian="6pt" style:font-size-complex="6pt"/>
    </style:style>
    <style:style style:name="P329" style:parent-style-name="Normal" style:family="paragraph">
      <style:text-properties fo:font-size="6pt" style:font-size-asian="6pt" style:font-size-complex="6pt"/>
    </style:style>
    <style:style style:name="P330" style:parent-style-name="Normal" style:family="paragraph">
      <style:text-properties fo:font-size="6pt" style:font-size-asian="6pt" style:font-size-complex="6pt"/>
    </style:style>
    <style:style style:name="P331" style:parent-style-name="Normal" style:family="paragraph">
      <style:text-properties fo:font-size="6pt" style:font-size-asian="6pt" style:font-size-complex="6pt"/>
    </style:style>
    <style:style style:name="P332" style:parent-style-name="Normal" style:family="paragraph">
      <style:text-properties fo:font-size="6pt" style:font-size-asian="6pt" style:font-size-complex="6pt"/>
    </style:style>
    <style:style style:name="P333" style:parent-style-name="Normal" style:family="paragraph">
      <style:text-properties fo:font-size="6pt" style:font-size-asian="6pt" style:font-size-complex="6pt"/>
    </style:style>
    <style:style style:name="P334" style:parent-style-name="Normal" style:family="paragraph">
      <style:text-properties fo:font-size="6pt" style:font-size-asian="6pt" style:font-size-complex="6pt"/>
    </style:style>
    <style:style style:name="P335" style:parent-style-name="Normal" style:family="paragraph">
      <style:text-properties fo:font-size="6pt" style:font-size-asian="6pt" style:font-size-complex="6pt"/>
    </style:style>
    <style:style style:name="P336" style:parent-style-name="Normal" style:family="paragraph">
      <style:text-properties fo:font-size="6pt" style:font-size-asian="6pt" style:font-size-complex="6pt"/>
    </style:style>
    <style:style style:name="P337" style:parent-style-name="Normal" style:family="paragraph">
      <style:text-properties fo:font-size="6pt" style:font-size-asian="6pt" style:font-size-complex="6pt"/>
    </style:style>
    <style:style style:name="P338" style:parent-style-name="Normal" style:family="paragraph">
      <style:text-properties fo:font-size="6pt" style:font-size-asian="6pt" style:font-size-complex="6pt"/>
    </style:style>
    <style:style style:name="P339" style:parent-style-name="Normal" style:family="paragraph">
      <style:text-properties fo:font-size="6pt" style:font-size-asian="6pt" style:font-size-complex="6pt"/>
    </style:style>
    <style:style style:name="P340" style:parent-style-name="Normal" style:family="paragraph">
      <style:text-properties fo:font-size="6pt" style:font-size-asian="6pt" style:font-size-complex="6pt"/>
    </style:style>
    <style:style style:name="P341" style:parent-style-name="Normal" style:family="paragraph">
      <style:text-properties fo:font-size="6pt" style:font-size-asian="6pt" style:font-size-complex="6pt"/>
    </style:style>
    <style:style style:name="P342" style:parent-style-name="Normal" style:family="paragraph">
      <style:text-properties fo:font-size="6pt" style:font-size-asian="6pt" style:font-size-complex="6pt"/>
    </style:style>
    <style:style style:name="P343" style:parent-style-name="Normal" style:family="paragraph">
      <style:text-properties fo:font-size="6pt" style:font-size-asian="6pt" style:font-size-complex="6pt"/>
    </style:style>
    <style:style style:name="P344" style:parent-style-name="Normal" style:family="paragraph">
      <style:text-properties fo:font-size="6pt" style:font-size-asian="6pt" style:font-size-complex="6pt"/>
    </style:style>
    <style:style style:name="P345" style:parent-style-name="Normal" style:family="paragraph">
      <style:text-properties fo:font-size="6pt" style:font-size-asian="6pt" style:font-size-complex="6pt"/>
    </style:style>
    <style:style style:name="P346" style:parent-style-name="Normal" style:family="paragraph">
      <style:text-properties fo:font-size="6pt" style:font-size-asian="6pt" style:font-size-complex="6pt"/>
    </style:style>
    <style:style style:name="P347" style:parent-style-name="Normal" style:family="paragraph">
      <style:text-properties fo:font-size="6pt" style:font-size-asian="6pt" style:font-size-complex="6pt"/>
    </style:style>
    <style:style style:name="P348" style:parent-style-name="Normal" style:family="paragraph">
      <style:text-properties fo:font-size="6pt" style:font-size-asian="6pt" style:font-size-complex="6pt"/>
    </style:style>
    <style:style style:name="P349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5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5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5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5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5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5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5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5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5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5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6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6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6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6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6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6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6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6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6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6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7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7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7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7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7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7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7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7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7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7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8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8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8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8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8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8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8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8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8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8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9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9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9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9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9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9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9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9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9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39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0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0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0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0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0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0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0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0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0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0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1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1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1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1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1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1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1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1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1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1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2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2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2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2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2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2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2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2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2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2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3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3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3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3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3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3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3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3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3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3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4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4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4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4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4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4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4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4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4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4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5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5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5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5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5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5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5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5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5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5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6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6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6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6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6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6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6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6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6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6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7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7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7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7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7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7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7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7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7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7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8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8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8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8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8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8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8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8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8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8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9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9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9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9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9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9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9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9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9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49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0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0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0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0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0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0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0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0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0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0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1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1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1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1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1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1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1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1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1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1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2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2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2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2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2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2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2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2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2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2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3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3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3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3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3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3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3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3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3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3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4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4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4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4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4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4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4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4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4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4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5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5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5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5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5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5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5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5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5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5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6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6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6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6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6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6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6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6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6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6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7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7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7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7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7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7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7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7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7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7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8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8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8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8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8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8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8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8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8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8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9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9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9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9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9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9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9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9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9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59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0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0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0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0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0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0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0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0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0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0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10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11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12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13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14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15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16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17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18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P619" style:parent-style-name="Normal" style:family="paragraph">
      <style:text-properties fo:font-weight="bold" style:font-weight-asian="bold" style:font-weight-complex="bold" fo:font-size="6pt" style:font-size-asian="6pt" style:font-size-complex="6pt"/>
    </style:style>
    <style:style style:name="T620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</office:automatic-styles>
  <office:body>
    <office:text text:use-soft-page-breaks="true">
      <text:p text:style-name="P1">Shared memory</text:p>
      <text:p text:style-name="P2">// =============CONSUMER============</text:p>
      <text:p text:style-name="P3"/>
      <text:p text:style-name="P4">#include &lt;stdio.h&gt;</text:p>
      <text:p text:style-name="P5">#include &lt;stdlib.h&gt;</text:p>
      <text:p text:style-name="P6">#include &lt;fcntl.h&gt;</text:p>
      <text:p text:style-name="P7">#include &lt;sys/shm.h&gt;</text:p>
      <text:p text:style-name="P8">#include &lt;sys/stat.h&gt;</text:p>
      <text:p text:style-name="P9">#include &lt;sys/mman.h&gt;</text:p>
      <text:p text:style-name="P10"/>
      <text:p text:style-name="P11">int main() {</text:p>
      <text:p text:style-name="P12">    const int size = 4096;</text:p>
      <text:p text:style-name="P13">    const har *name = "os";</text:p>
      <text:p text:style-name="P14">    int fd;</text:p>
      <text:p text:style-name="P15">    char* ptr;</text:p>
      <text:p text:style-name="P16"/>
      <text:p text:style-name="P17">    fd = shm_open(name, O_RDONLY, 0666);</text:p>
      <text:p text:style-name="P18"/>
      <text:p text:style-name="P19">    ptr = (char*)mmap(0, size, PROT_READ | PROT_WRITE,</text:p>
      <text:p text:style-name="P20">        MAP_SHARED, fd, 0);</text:p>
      <text:p text:style-name="P21">   <text:s/></text:p>
      <text:p text:style-name="P22">    printf("%s", (char*)ptr);</text:p>
      <text:p text:style-name="P23">    shm_unlink(name);</text:p>
      <text:p text:style-name="P24">    return 0;</text:p>
      <text:p text:style-name="P25">}</text:p>
      <text:p text:style-name="P26"/>
      <text:p text:style-name="P27">// =============PRODUCER==============</text:p>
      <text:p text:style-name="P28">int main() {</text:p>
      <text:p text:style-name="P29">    const int size = 4096;</text:p>
      <text:p text:style-name="P30">    const char* name = "os";</text:p>
      <text:p text:style-name="P31">    const char* msg1 = "hello";</text:p>
      <text:p text:style-name="P32">    const char* msg2 = " world";</text:p>
      <text:p text:style-name="P33">   <text:s/></text:p>
      <text:p text:style-name="P34">    int fd;</text:p>
      <text:p text:style-name="P35">    char* ptr;</text:p>
      <text:p text:style-name="P36"/>
      <text:p text:style-name="P37">    fd = shm_open(name, O_CREAT | O_RDWR, 0666);</text:p>
      <text:p text:style-name="P38">    ftruncate(fd, size);</text:p>
      <text:p text:style-name="P39"/>
      <text:p text:style-name="P40">    ptr = (char*)mmap(0, size, PROT_READ | PROT_WRITE,</text:p>
      <text:p text:style-name="P41">        MAP_SHARED, fd, 0);</text:p>
      <text:p text:style-name="P42">   <text:s/></text:p>
      <text:p text:style-name="P43">    sprintf(ptr, "%s", msg1);</text:p>
      <text:p text:style-name="P44">    ptr += len(msg1);</text:p>
      <text:p text:style-name="P45"/>
      <text:p text:style-name="P46">    sprintf(ptr, "%s", msg2);</text:p>
      <text:p text:style-name="P47">    ptr += len(msg2);</text:p>
      <text:p text:style-name="P48"/>
      <text:p text:style-name="P49">    shm_unlink(name)</text:p>
      <text:p text:style-name="P50">   <text:s/></text:p>
      <text:p text:style-name="P51">    return 0;</text:p>
      <text:p text:style-name="P52">}</text:p>
      <text:p text:style-name="P53"/>
      <text:p text:style-name="P54"/>
      <text:p text:style-name="P55"/>
      <text:p text:style-name="P56"/>
      <text:p text:style-name="P57">Threads</text:p>
      <text:p text:style-name="P58">#define _XOPEN_SOURCE 700</text:p>
      <text:p text:style-name="P59"/>
      <text:p text:style-name="P60">#include &lt;stdio.h&gt;</text:p>
      <text:p text:style-name="P61">#include &lt;unistd.h&gt;</text:p>
      <text:p text:style-name="P62">#include &lt;signal.h&gt;</text:p>
      <text:p text:style-name="P63">#include &lt;stdlib.h&gt;</text:p>
      <text:p text:style-name="P64">#include &lt;sys/resoure.h&gt;</text:p>
      <text:p text:style-name="P65">#include &lt;sys/wait.h&gt;</text:p>
      <text:p text:style-name="P66"/>
      <text:p text:style-name="P67">void sigint_handler(int signum) {</text:p>
      <text:p text:style-name="P68">    signal(SIGINT, SIG_IGN);</text:p>
      <text:p text:style-name="P69">    fprintf(stdout, "counght signint signal (%d)\n", signum);</text:p>
      <text:p text:style-name="P70">    exit(0);</text:p>
      <text:p text:style-name="P71">}</text:p>
      <text:p text:style-name="P72"/>
      <text:p text:style-name="P73">int main() {</text:p>
      <text:p text:style-name="P74">    if(signal(SIGINT, sigint_handler)==SIG_ERR) {</text:p>
      <text:p text:style-name="P75">        printf("error setting up handler for sigint\n");</text:p>
      <text:p text:style-name="P76">    }</text:p>
      <text:p text:style-name="P77">    fprintf(stdout,"press ctrl+C to generate SIGINT\n");</text:p>
      <text:p text:style-name="P78"/>
      <text:p text:style-name="P79">    while(1) {</text:p>
      <text:p text:style-name="P80">        sleep(1);</text:p>
      <text:p text:style-name="P81">    }</text:p>
      <text:p text:style-name="P82">    return 0;</text:p>
      <text:p text:style-name="P83">}</text:p>
      <text:p text:style-name="P84"/>
      <text:p text:style-name="P85">void sigint_handler(int signum) {</text:p>
      <text:p text:style-name="P86">    fprintf(stdout, "ctrl + c, sigint received\n");</text:p>
      <text:p text:style-name="P87">    exit(signum);</text:p>
      <text:p text:style-name="P88">}</text:p>
      <text:p text:style-name="P89"/>
      <text:p text:style-name="P90">int main() {</text:p>
      <text:p text:style-name="P91">    struct sigaction sa;</text:p>
      <text:p text:style-name="P92"/>
      <text:p text:style-name="P93">    sa.sa_handler = sigint_handler;</text:p>
      <text:p text:style-name="P94">    sigemptyset(&amp;sa.sa_mask);</text:p>
      <text:p text:style-name="P95">    sa.sa_flags = 0;</text:p>
      <text:p text:style-name="P96"/>
      <text:p text:style-name="P97">    if (sigaction(SIGINT, &amp;sa, NULL) == -1) {</text:p>
      <text:p text:style-name="P98">        perror("sigaction");</text:p>
      <text:p text:style-name="P99">        return EXIT_FAILURE;</text:p>
      <text:p text:style-name="P100">    }</text:p>
      <text:p text:style-name="P101"/>
      <text:p text:style-name="P102">    while (1) {</text:p>
      <text:p text:style-name="P103">        printf("running\n");</text:p>
      <text:p text:style-name="P104">        sleep(1);</text:p>
      <text:p text:style-name="P105">    }</text:p>
      <text:p text:style-name="P106"/>
      <text:p text:style-name="P107">    return EXIT_SUCCESS;</text:p>
      <text:p text:style-name="P108">}</text:p>
      <text:p text:style-name="P109"/>
      <text:p text:style-name="P110">#include &lt;sys/resoure.h&gt;</text:p>
      <text:p text:style-name="P111">#include &lt;sys/wait.h&gt;</text:p>
      <text:p text:style-name="P112"/>
      <text:p text:style-name="P113">void proc_exit() {</text:p>
      <text:p text:style-name="P114">    int wstat;</text:p>
      <text:p text:style-name="P115">    pid_t pid;</text:p>
      <text:p text:style-name="P116"/>
      <text:p text:style-name="P117">    while(1) {</text:p>
      <text:p text:style-name="P118"/>
      <text:p text:style-name="P119">        pid = wait3(&amp;wstat, WNOHANG, NULL);</text:p>
      <text:p text:style-name="P120">        if(pid==0 || pid == -1) {</text:p>
      <text:p text:style-name="P121">            fprintf(stdout, "return value of wait3() is: %d\n", pid);</text:p>
      <text:p text:style-name="P122">            return;</text:p>
      <text:p text:style-name="P123">        }</text:p>
      <text:p text:style-name="P124">        fprintf(stdout, "return value is: %d\n", wstat);</text:p>
      <text:p text:style-name="P125">    }</text:p>
      <text:p text:style-name="P126">}</text:p>
      <text:p text:style-name="P127"/>
      <text:p text:style-name="P128">int main9 {</text:p>
      <text:p text:style-name="P129">    signal(SIGCHLD, proc_exit);</text:p>
      <text:p text:style-name="P130"/>
      <text:p text:style-name="P131">    switch(fork()) {</text:p>
      <text:p text:style-name="P132">        case -1:</text:p>
      <text:p text:style-name="P133">            perror("main: fork error");</text:p>
      <text:p text:style-name="P134">            exit(0);</text:p>
      <text:p text:style-name="P135">        case 0:</text:p>
      <text:p text:style-name="P136">            printf("im runiing temporarily, \n");</text:p>
      <text:p text:style-name="P137">            int ret = rand();</text:p>
      <text:p text:style-name="P138">            printf("return code: %d\n", ret);</text:p>
      <text:p text:style-name="P139">            exit(ret);</text:p>
      <text:p text:style-name="P140">        default:</text:p>
      <text:p text:style-name="P141">            pause();<text:s/></text:p>
      <text:p text:style-name="P142">    }</text:p>
      <text:p text:style-name="P143">    exit(0);</text:p>
      <text:p text:style-name="P144">}</text:p>
      <text:p text:style-name="P145"/>
      <text:p text:style-name="P146">#include &lt;pthread.h&gt;</text:p>
      <text:p text:style-name="P147"/>
      <text:p text:style-name="P148">#define num_threads 4</text:p>
      <text:p text:style-name="P149">pthread_t threads[num_threads];</text:p>
      <text:p text:style-name="P150"/>
      <text:p text:style-name="P151">void sigusr1_handler(int signum) {</text:p>
      <text:p text:style-name="P152">    int i= gettid(), j = getppid(), k = getpid();</text:p>
      <text:p text:style-name="P153">    fprintf(stdout, "this thread: %u, sys level thread %u, parent: %u, tid %u\n", pthread_self(), i, j, k);</text:p>
      <text:p text:style-name="P154">}</text:p>
      <text:p text:style-name="P155"/>
      <text:p text:style-name="P156">void * thread_function(void *arg) {</text:p>
      <text:p text:style-name="P157">    while(1) {</text:p>
      <text:p text:style-name="P158">        fprintf(stdout, "thread running\n");</text:p>
      <text:p text:style-name="P159">        sleep(1);</text:p>
      <text:p text:style-name="P160">    }</text:p>
      <text:p text:style-name="P161">    return NULL;</text:p>
      <text:p text:style-name="P162">}</text:p>
      <text:p text:style-name="P163"/>
      <text:p text:style-name="P164">int main() {</text:p>
      <text:p text:style-name="P165">    signal(SIGUSR1, sigusr1_handler);</text:p>
      <text:p text:style-name="P166"/>
      <text:p text:style-name="P167">    for(int i=0; i&lt;num_threads; i++) {</text:p>
      <text:p text:style-name="P168">        if(pthread_create(&amp;threads[i], NULL, thread_function, NULL) != 0) {</text:p>
      <text:p text:style-name="P169">            perror("Pthread create: main");</text:p>
      <text:p text:style-name="P170">            exit(EXIT_FAILURE);</text:p>
      <text:p text:style-name="P171">        }</text:p>
      <text:p text:style-name="P172">    }</text:p>
      <text:p text:style-name="P173">    int i=gettid(), j=getpid(),k=getppid();</text:p>
      <text:p text:style-name="P174">    fprintf(stdout, "this thread: %u, sys level thread %u, parent: %u, tid %u\n", pthread_self(), i, j, k);</text:p>
      <text:p text:style-name="P175"/>
      <text:p text:style-name="P176">    fprintf(stdout, "thread ID: 0:u 1:%u 2:%u 3:%u", threads[0], threads[1], threads[2], threads[2]);</text:p>
      <text:p text:style-name="P177"/>
      <text:p text:style-name="P178">    kill(j, SIGUSR1);</text:p>
      <text:p text:style-name="P179">    pthread_kill(threads[2], SIGUSR1);</text:p>
      <text:p text:style-name="P180"/>
      <text:p text:style-name="P181">    for(int i=0; i&lt;num_threads; i++) {</text:p>
      <text:p text:style-name="P182">        if(pthread_join(threads[i], NULL) != 0) {</text:p>
      <text:p text:style-name="P183">            perror("Pthread join");</text:p>
      <text:p text:style-name="P184">            exit(EXIT_FAILURE);</text:p>
      <text:p text:style-name="P185">        }</text:p>
      <text:p text:style-name="P186">    }</text:p>
      <text:p text:style-name="P187">    return 0;</text:p>
      <text:p text:style-name="P188">}</text:p>
      <text:p text:style-name="P189"/>
      <text:p text:style-name="P190"/>
      <text:p text:style-name="P191"/>
      <text:p text:style-name="P192"/>
      <text:p text:style-name="P193"/>
      <text:p text:style-name="P194">Signals</text:p>
      <text:p text:style-name="P195">#define _XOPEN_SOURCE 700</text:p>
      <text:p text:style-name="P196"/>
      <text:p text:style-name="P197">#include &lt;stdio.h&gt;</text:p>
      <text:p text:style-name="P198">#include &lt;unistd.h&gt;</text:p>
      <text:p text:style-name="P199">#include &lt;signal.h&gt;</text:p>
      <text:p text:style-name="P200">#include &lt;stdlib.h&gt;</text:p>
      <text:p text:style-name="P201">#include &lt;sys/resoure.h&gt;</text:p>
      <text:p text:style-name="P202">#include &lt;sys/wait.h&gt;</text:p>
      <text:p text:style-name="P203"/>
      <text:p text:style-name="P204">void sigint_handler(int signum) {</text:p>
      <text:p text:style-name="P205">    signal(SIGINT, SIG_IGN);</text:p>
      <text:p text:style-name="P206">    fprintf(stdout, "counght signint signal (%d)\n", signum);</text:p>
      <text:p text:style-name="P207">    exit(0);</text:p>
      <text:p text:style-name="P208">}</text:p>
      <text:p text:style-name="P209"/>
      <text:p text:style-name="P210">int main() {</text:p>
      <text:p text:style-name="P211">    if(signal(SIGINT, sigint_handler)==SIG_ERR) {</text:p>
      <text:p text:style-name="P212">        printf("error setting up handler for sigint\n");</text:p>
      <text:p text:style-name="P213">    }</text:p>
      <text:p text:style-name="P214">    fprintf(stdout,"press ctrl+C to generate SIGINT\n");</text:p>
      <text:p text:style-name="P215"/>
      <text:p text:style-name="P216">    while(1) {</text:p>
      <text:p text:style-name="P217">        sleep(1);</text:p>
      <text:p text:style-name="P218">    }</text:p>
      <text:p text:style-name="P219">    return 0;</text:p>
      <text:p text:style-name="P220">}</text:p>
      <text:p text:style-name="P221"/>
      <text:p text:style-name="P222">void sigint_handler(int signum) {</text:p>
      <text:p text:style-name="P223">    fprintf(stdout, "ctrl + c, sigint received\n");</text:p>
      <text:p text:style-name="P224">    exit(signum);</text:p>
      <text:p text:style-name="P225">}</text:p>
      <text:p text:style-name="P226"/>
      <text:p text:style-name="P227">int main() {</text:p>
      <text:p text:style-name="P228">    struct sigaction sa;</text:p>
      <text:p text:style-name="P229"/>
      <text:p text:style-name="P230">    sa.sa_handler = sigint_handler;</text:p>
      <text:p text:style-name="P231">    sigemptyset(&amp;sa.sa_mask);</text:p>
      <text:p text:style-name="P232">    sa.sa_flags = 0;</text:p>
      <text:p text:style-name="P233"/>
      <text:p text:style-name="P234">    if (sigaction(SIGINT, &amp;sa, NULL) == -1) {</text:p>
      <text:p text:style-name="P235">        perror("sigaction");</text:p>
      <text:p text:style-name="P236">        return EXIT_FAILURE;</text:p>
      <text:p text:style-name="P237">    }</text:p>
      <text:p text:style-name="P238"/>
      <text:p text:style-name="P239">    while (1) {</text:p>
      <text:p text:style-name="P240">        printf("running\n");</text:p>
      <text:p text:style-name="P241">        sleep(1);</text:p>
      <text:p text:style-name="P242">    }</text:p>
      <text:p text:style-name="P243"/>
      <text:p text:style-name="P244">    return EXIT_SUCCESS;</text:p>
      <text:p text:style-name="P245">}</text:p>
      <text:p text:style-name="P246"/>
      <text:p text:style-name="P247">#include &lt;sys/resoure.h&gt;</text:p>
      <text:p text:style-name="P248">#include &lt;sys/wait.h&gt;</text:p>
      <text:p text:style-name="P249"/>
      <text:p text:style-name="P250">void proc_exit() {</text:p>
      <text:p text:style-name="P251">    int wstat;</text:p>
      <text:p text:style-name="P252">    pid_t pid;</text:p>
      <text:p text:style-name="P253"/>
      <text:p text:style-name="P254">    while(1) {</text:p>
      <text:p text:style-name="P255"/>
      <text:p text:style-name="P256">        pid = wait3(&amp;wstat, WNOHANG, NULL);</text:p>
      <text:p text:style-name="P257">        if(pid==0 || pid == -1) {</text:p>
      <text:p text:style-name="P258">            fprintf(stdout, "return value of wait3() is: %d\n", pid);</text:p>
      <text:p text:style-name="P259">            return;</text:p>
      <text:p text:style-name="P260">        }</text:p>
      <text:p text:style-name="P261">        fprintf(stdout, "return value is: %d\n", wstat);</text:p>
      <text:p text:style-name="P262">    }</text:p>
      <text:p text:style-name="P263">}</text:p>
      <text:p text:style-name="P264"/>
      <text:p text:style-name="P265">int main9 {</text:p>
      <text:p text:style-name="P266">    signal(SIGCHLD, proc_exit);</text:p>
      <text:p text:style-name="P267"/>
      <text:p text:style-name="P268">    switch(fork()) {</text:p>
      <text:p text:style-name="P269">        case -1:</text:p>
      <text:p text:style-name="P270">            perror("main: fork error");</text:p>
      <text:p text:style-name="P271">            exit(0);</text:p>
      <text:p text:style-name="P272">        case 0:</text:p>
      <text:p text:style-name="P273">            printf("im runiing temporarily, \n");</text:p>
      <text:p text:style-name="P274">            int ret = rand();</text:p>
      <text:p text:style-name="P275">            printf("return code: %d\n", ret);</text:p>
      <text:p text:style-name="P276">            exit(ret);</text:p>
      <text:p text:style-name="P277">        default:</text:p>
      <text:p text:style-name="P278">            pause();<text:s/></text:p>
      <text:p text:style-name="P279">    }</text:p>
      <text:p text:style-name="P280">    exit(0);</text:p>
      <text:p text:style-name="P281">}</text:p>
      <text:p text:style-name="P282"/>
      <text:p text:style-name="P283">#include &lt;pthread.h&gt;</text:p>
      <text:p text:style-name="P284"/>
      <text:p text:style-name="P285">#define num_threads 4</text:p>
      <text:p text:style-name="P286">pthread_t threads[num_threads];</text:p>
      <text:p text:style-name="P287"/>
      <text:p text:style-name="P288">void sigusr1_handler(int signum) {</text:p>
      <text:p text:style-name="P289">    int i= gettid(), j = getppid(), k = getpid();</text:p>
      <text:p text:style-name="P290">    fprintf(stdout, "this thread: %u, sys level thread %u, parent: %u, tid %u\n", pthread_self(), i, j, k);</text:p>
      <text:p text:style-name="P291">}</text:p>
      <text:p text:style-name="P292"/>
      <text:p text:style-name="P293">void * thread_function(void *arg) {</text:p>
      <text:p text:style-name="P294">    while(1) {</text:p>
      <text:p text:style-name="P295">        fprintf(stdout, "thread running\n");</text:p>
      <text:p text:style-name="P296">        sleep(1);</text:p>
      <text:p text:style-name="P297">    }</text:p>
      <text:p text:style-name="P298">    return NULL;</text:p>
      <text:p text:style-name="P299">}</text:p>
      <text:p text:style-name="P300"/>
      <text:p text:style-name="P301">int main() {</text:p>
      <text:p text:style-name="P302">    signal(SIGUSR1, sigusr1_handler);</text:p>
      <text:p text:style-name="P303"/>
      <text:p text:style-name="P304">    for(int i=0; i&lt;num_threads; i++) {</text:p>
      <text:p text:style-name="P305">        if(pthread_create(&amp;threads[i], NULL, thread_function, NULL) != 0) {</text:p>
      <text:p text:style-name="P306">            perror("Pthread create: main");</text:p>
      <text:p text:style-name="P307">            exit(EXIT_FAILURE);</text:p>
      <text:p text:style-name="P308">        }</text:p>
      <text:p text:style-name="P309">    }</text:p>
      <text:p text:style-name="P310">    int i=gettid(), j=getpid(),k=getppid();</text:p>
      <text:p text:style-name="P311">    fprintf(stdout, "this thread: %u, sys level thread %u, parent: %u, tid %u\n", pthread_self(), i, j, k);</text:p>
      <text:p text:style-name="P312"/>
      <text:p text:style-name="P313">    fprintf(stdout, "thread ID: 0:u 1:%u 2:%u 3:%u", threads[0], threads[1], threads[2], threads[2]);</text:p>
      <text:p text:style-name="P314"/>
      <text:p text:style-name="P315">    kill(j, SIGUSR1);</text:p>
      <text:p text:style-name="P316">    pthread_kill(threads[2], SIGUSR1);</text:p>
      <text:p text:style-name="P317"/>
      <text:p text:style-name="P318">    for(int i=0; i&lt;num_threads; i++) {</text:p>
      <text:p text:style-name="P319">        if(pthread_join(threads[i], NULL) != 0) {</text:p>
      <text:p text:style-name="P320">            perror("Pthread join");</text:p>
      <text:p text:style-name="P321">            exit(EXIT_FAILURE);</text:p>
      <text:p text:style-name="P322">        }</text:p>
      <text:p text:style-name="P323">    }</text:p>
      <text:p text:style-name="P324">    return 0;</text:p>
      <text:p text:style-name="P325">}</text:p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>Mutex and semaphore</text:p>
      <text:p text:style-name="P350">// ======================MUTEX======================</text:p>
      <text:p text:style-name="P351"/>
      <text:p text:style-name="P352">#include &lt;pthread.h&gt;</text:p>
      <text:p text:style-name="P353">#include &lt;stdio.h&gt;</text:p>
      <text:p text:style-name="P354"/>
      <text:p text:style-name="P355">#define num_threds 5</text:p>
      <text:p text:style-name="P356"> int sharedData = 0;</text:p>
      <text:p text:style-name="P357"> pthread_mutex_t mutex;</text:p>
      <text:p text:style-name="P358"/>
      <text:p text:style-name="P359">void* thread(void *arg) {</text:p>
      <text:p text:style-name="P360">    int thread_id = *((int*) arg);</text:p>
      <text:p text:style-name="P361">   <text:s/></text:p>
      <text:p text:style-name="P362">    pthread_mutex_lock(&amp;mutex);</text:p>
      <text:p text:style-name="P363">    sharedData++;</text:p>
      <text:p text:style-name="P364">    printf("Shared data: %d\n", sharedData);</text:p>
      <text:p text:style-name="P365">    pthread_mutex_unlock(&amp;mutex);</text:p>
      <text:p text:style-name="P366"/>
      <text:p text:style-name="P367">    pthread_exit(NULL);</text:p>
      <text:p text:style-name="P368">}</text:p>
      <text:p text:style-name="P369"/>
      <text:p text:style-name="P370">int main() {</text:p>
      <text:p text:style-name="P371">    pthread_t threads[num_threds];</text:p>
      <text:p text:style-name="P372">    int threads_ags[num_threds];</text:p>
      <text:p text:style-name="P373">    int i;</text:p>
      <text:p text:style-name="P374"/>
      <text:p text:style-name="P375">    pthread_mutex_init(&amp;mutex, NULL);</text:p>
      <text:p text:style-name="P376"/>
      <text:p text:style-name="P377">    for (int i=0;i&lt;num_threds; i++) {</text:p>
      <text:p text:style-name="P378">        threads_ags[i] = i;</text:p>
      <text:p text:style-name="P379">        pthread_create(&amp;threads[i], NULL, thread, &amp;threads_ags[i]);</text:p>
      <text:p text:style-name="P380">    }</text:p>
      <text:p text:style-name="P381">    for(int i=0; i&lt;num_threds; i++) {</text:p>
      <text:p text:style-name="P382">        pthread_join(threads[i], NULL);</text:p>
      <text:p text:style-name="P383">    }</text:p>
      <text:p text:style-name="P384">    pthread_mutex_destroy(&amp;mutex);</text:p>
      <text:p text:style-name="P385"/>
      <text:p text:style-name="P386">    return 0;</text:p>
      <text:p text:style-name="P387">}</text:p>
      <text:p text:style-name="P388"/>
      <text:p text:style-name="P389">// ================SEMAPHORE===================</text:p>
      <text:p text:style-name="P390"/>
      <text:p text:style-name="P391">#include &lt;pthread.h&gt;</text:p>
      <text:p text:style-name="P392">#include &lt;semaphore.h&gt;</text:p>
      <text:p text:style-name="P393">#include &lt;stdio.h&gt;</text:p>
      <text:p text:style-name="P394"/>
      <text:p text:style-name="P395">#define buffer_size 5</text:p>
      <text:p text:style-name="P396">#define num_prod 2</text:p>
      <text:p text:style-name="P397">#define num_con 2</text:p>
      <text:p text:style-name="P398"/>
      <text:p text:style-name="P399">int buffer[buffer_size] = {-1, -1, -1, -1, -1};</text:p>
      <text:p text:style-name="P400">sem_t empty_slots, full_slots;</text:p>
      <text:p text:style-name="P401">pthread_mutex_t mutex;</text:p>
      <text:p text:style-name="P402"/>
      <text:p text:style-name="P403">void* producer(void* arg) {</text:p>
      <text:p text:style-name="P404">    int item = *((int *) arg);</text:p>
      <text:p text:style-name="P405"/>
      <text:p text:style-name="P406">    sem_wait(&amp;empty_slots);</text:p>
      <text:p text:style-name="P407">    pthread_mutex_lock(&amp;mutex);</text:p>
      <text:p text:style-name="P408"/>
      <text:p text:style-name="P409">    for(int i=0;i&lt;buffer_size;i++) {</text:p>
      <text:p text:style-name="P410">        printf("BUFFER : %d\n",buffer[i]);</text:p>
      <text:p text:style-name="P411">        if(buffer[i] == -1) {</text:p>
      <text:p text:style-name="P412">            buffer[i] = item;</text:p>
      <text:p text:style-name="P413">            break;</text:p>
      <text:p text:style-name="P414">        }</text:p>
      <text:p text:style-name="P415">    }</text:p>
      <text:p text:style-name="P416"/>
      <text:p text:style-name="P417">    pthread_mutex_unlock(&amp;mutex);</text:p>
      <text:p text:style-name="P418">    sem_post(&amp;full_slots);</text:p>
      <text:p text:style-name="P419"/>
      <text:p text:style-name="P420">    pthread_exit(NULL);</text:p>
      <text:p text:style-name="P421">}</text:p>
      <text:p text:style-name="P422"/>
      <text:p text:style-name="P423">void* consumer(void* arg) {</text:p>
      <text:p text:style-name="P424">    int item = -1;</text:p>
      <text:p text:style-name="P425">    sem_wait(&amp;full_slots);</text:p>
      <text:p text:style-name="P426">    pthread_mutex_lock(&amp;mutex);</text:p>
      <text:p text:style-name="P427"/>
      <text:p text:style-name="P428">    for(int i=0;i&lt;buffer_size;i++) {</text:p>
      <text:p text:style-name="P429">        if(buffer[i] != -1) {</text:p>
      <text:p text:style-name="P430">            item = buffer[i];</text:p>
      <text:p text:style-name="P431">            buffer[i] = -1;</text:p>
      <text:p text:style-name="P432">            break;</text:p>
      <text:p text:style-name="P433">        }</text:p>
      <text:p text:style-name="P434">    }</text:p>
      <text:p text:style-name="P435"/>
      <text:p text:style-name="P436">    pthread_mutex_unlock(&amp;mutex);</text:p>
      <text:p text:style-name="P437">    sem_post(&amp;empty_slots);</text:p>
      <text:p text:style-name="P438"/>
      <text:p text:style-name="P439">    printf("ITEM: %d\n", item);</text:p>
      <text:p text:style-name="P440">    pthread_exit(NULL);</text:p>
      <text:p text:style-name="P441">}</text:p>
      <text:p text:style-name="P442"/>
      <text:p text:style-name="P443">int main() {</text:p>
      <text:p text:style-name="P444">    pthread_t producer_threads[num_prod], consumer_threads[num_con];</text:p>
      <text:p text:style-name="P445">    int producer_arg[num_prod] = {1, 2};</text:p>
      <text:p text:style-name="P446"/>
      <text:p text:style-name="P447">    pthread_mutex_init(&amp;mutex, NULL);</text:p>
      <text:p text:style-name="P448">    sem_init(&amp;empty_slots, 0, buffer_size);</text:p>
      <text:p text:style-name="P449">    sem_init(&amp;full_slots, 0, 0);</text:p>
      <text:p text:style-name="P450"/>
      <text:p text:style-name="P451">    for(int i=0;i&lt;num_prod;i++) {</text:p>
      <text:p text:style-name="P452">        pthread_create(&amp;producer_threads[i], NULL, producer, &amp;producer_arg[i]);</text:p>
      <text:p text:style-name="P453">    }</text:p>
      <text:p text:style-name="P454">    for(int i=0;i&lt;num_con;i++) {</text:p>
      <text:p text:style-name="P455">        pthread_create(&amp;consumer_threads[i], NULL, consumer, NULL);</text:p>
      <text:p text:style-name="P456">    }</text:p>
      <text:p text:style-name="P457"/>
      <text:p text:style-name="P458">    for(int i=0;i&lt;num_prod;i++) {</text:p>
      <text:p text:style-name="P459">        pthread_join(producer_threads[i], NULL);</text:p>
      <text:p text:style-name="P460">    }</text:p>
      <text:p text:style-name="P461">    for(int i=0;i&lt;num_con;i++) {</text:p>
      <text:p text:style-name="P462">        pthread_join(consumer_threads[i], NULL);</text:p>
      <text:p text:style-name="P463">    }</text:p>
      <text:p text:style-name="P464"/>
      <text:p text:style-name="P465">    pthread_mutex_destroy(&amp;mutex);</text:p>
      <text:p text:style-name="P466">    sem_destroy(&amp;empty_slots);</text:p>
      <text:p text:style-name="P467">    sem_destroy(&amp;full_slots);</text:p>
      <text:p text:style-name="P468"/>
      <text:p text:style-name="P469">    return 0;</text:p>
      <text:p text:style-name="P470">}</text:p>
      <text:p text:style-name="P471"/>
      <text:p text:style-name="P472">// ===================BOUNDED BUFFER======================</text:p>
      <text:p text:style-name="P473">#include &lt;stdio.h&gt;</text:p>
      <text:p text:style-name="P474">#include &lt;stdlib.h&gt;</text:p>
      <text:p text:style-name="P475">#include &lt;pthread.h&gt;</text:p>
      <text:p text:style-name="P476">#include &lt;semaphore.h&gt;</text:p>
      <text:p text:style-name="P477"/>
      <text:p text:style-name="P478">#define BUFFER_SIZE 5</text:p>
      <text:p text:style-name="P479">sem_t mutex, empty, full;</text:p>
      <text:p text:style-name="P480">int buffer[BUFFER_SIZE];</text:p>
      <text:p text:style-name="P481">int in = 0, out = 0;</text:p>
      <text:p text:style-name="P482"/>
      <text:p text:style-name="P483">void *producer(void *arg) {</text:p>
      <text:p text:style-name="P484">    int item;</text:p>
      <text:p text:style-name="P485">    while (1) {</text:p>
      <text:p text:style-name="P486">        item = rand() % 100; // Generate a random item to produce</text:p>
      <text:p text:style-name="P487">        sem_wait(&amp;empty);</text:p>
      <text:p text:style-name="P488">        sem_wait(&amp;mutex);</text:p>
      <text:p text:style-name="P489">        buffer[in] = item;</text:p>
      <text:p text:style-name="P490">        printf("Produced: %d\n", item);</text:p>
      <text:p text:style-name="P491">        in = (in + 1) % BUFFER_SIZE;</text:p>
      <text:p text:style-name="P492">        sem_post(&amp;mutex);</text:p>
      <text:p text:style-name="P493">        sem_post(&amp;full);</text:p>
      <text:p text:style-name="P494">        sleep(rand() % 3); // Simulate some processing time</text:p>
      <text:p text:style-name="P495">    }</text:p>
      <text:p text:style-name="P496">}</text:p>
      <text:p text:style-name="P497">void *consumer(void *arg) {</text:p>
      <text:p text:style-name="P498">    int item;</text:p>
      <text:p text:style-name="P499">    while (1) {</text:p>
      <text:p text:style-name="P500">        sem_wait(&amp;full);</text:p>
      <text:p text:style-name="P501">        sem_wait(&amp;mutex);</text:p>
      <text:p text:style-name="P502">        item = buffer[out];</text:p>
      <text:p text:style-name="P503">        printf("Consumed: %d\n", item);</text:p>
      <text:p text:style-name="P504">        out = (out + 1) % BUFFER_SIZE;</text:p>
      <text:p text:style-name="P505">        sem_post(&amp;mutex);</text:p>
      <text:p text:style-name="P506">        sem_post(&amp;empty);</text:p>
      <text:p text:style-name="P507">        sleep(rand() % 3); // Simulate some processing time</text:p>
      <text:p text:style-name="P508">    }</text:p>
      <text:p text:style-name="P509">}</text:p>
      <text:p text:style-name="P510">int main() {</text:p>
      <text:p text:style-name="P511">    pthread_t producer_thread, consumer_thread;</text:p>
      <text:p text:style-name="P512"/>
      <text:p text:style-name="P513">    sem_init(&amp;mutex, 0, 1);</text:p>
      <text:p text:style-name="P514">    sem_init(&amp;empty, 0, BUFFER_SIZE);</text:p>
      <text:p text:style-name="P515">    sem_init(&amp;full, 0, 0);</text:p>
      <text:p text:style-name="P516"/>
      <text:p text:style-name="P517">    pthread_create(&amp;producer_thread, NULL, producer, NULL);</text:p>
      <text:p text:style-name="P518">    pthread_create(&amp;consumer_thread, NULL, consumer, NULL);</text:p>
      <text:p text:style-name="P519"/>
      <text:p text:style-name="P520">    pthread_join(producer_thread, NULL);</text:p>
      <text:p text:style-name="P521">    pthread_join(consumer_thread, NULL);</text:p>
      <text:p text:style-name="P522"/>
      <text:p text:style-name="P523">    sem_destroy(&amp;mutex);</text:p>
      <text:p text:style-name="P524">    sem_destroy(&amp;empty);</text:p>
      <text:p text:style-name="P525">    sem_destroy(&amp;full);</text:p>
      <text:p text:style-name="P526">    return 0;</text:p>
      <text:p text:style-name="P527">}</text:p>
      <text:p text:style-name="P528"/>
      <text:p text:style-name="P529">// ==================READER_WRITER==================</text:p>
      <text:p text:style-name="P530"/>
      <text:p text:style-name="P531">#include &lt;stdio.h&gt;</text:p>
      <text:p text:style-name="P532">#include &lt;stdlib.h&gt;</text:p>
      <text:p text:style-name="P533">#include &lt;time.h&gt;</text:p>
      <text:p text:style-name="P534">#include &lt;semaphore.h&gt;</text:p>
      <text:p text:style-name="P535">#include &lt;pthread.h&gt;</text:p>
      <text:p text:style-name="P536"/>
      <text:p text:style-name="P537">#define NUM_READERS 5</text:p>
      <text:p text:style-name="P538">#define NUM_WRITERS 2</text:p>
      <text:p text:style-name="P539">#define STRING_LENGTH 60</text:p>
      <text:p text:style-name="P540"/>
      <text:p text:style-name="P541">pthread_t readers[NUM_READERS], writers[NUM_WRITERS];</text:p>
      <text:p text:style-name="P542">sem_t mutex, rw_mutex;</text:p>
      <text:p text:style-name="P543">int readers_count = 0;</text:p>
      <text:p text:style-name="P544">FILE *file;</text:p>
      <text:p text:style-name="P545"/>
      <text:p text:style-name="P546">char generateRandomChar() {</text:p>
      <text:p text:style-name="P547">    return (char)('a' + rand() % 26); // Generating a random lowercase character</text:p>
      <text:p text:style-name="P548">}</text:p>
      <text:p text:style-name="P549"/>
      <text:p text:style-name="P550">void *reader(void *arg) {</text:p>
      <text:p text:style-name="P551">    while (1) {</text:p>
      <text:p text:style-name="P552">        sem_wait(&amp;mutex);</text:p>
      <text:p text:style-name="P553">        readers_count++;</text:p>
      <text:p text:style-name="P554"/>
      <text:p text:style-name="P555">        if (readers_count == 1) {</text:p>
      <text:p text:style-name="P556">            sem_wait(&amp;rw_mutex);</text:p>
      <text:p text:style-name="P557">        }</text:p>
      <text:p text:style-name="P558"/>
      <text:p text:style-name="P559">        sem_post(&amp;mutex);</text:p>
      <text:p text:style-name="P560">        // Reading from file</text:p>
      <text:p text:style-name="P561">        fseek(file, 0, SEEK_SET);</text:p>
      <text:p text:style-name="P562">        char buffer[256];</text:p>
      <text:p text:style-name="P563">        while (fgets(buffer, sizeof(buffer), file) != NULL) {</text:p>
      <text:p text:style-name="P564">            fprintf(stdout,"Reader %ld: %s", (long)arg, buffer);</text:p>
      <text:p text:style-name="P565">        }</text:p>
      <text:p text:style-name="P566">        sem_wait(&amp;mutex);</text:p>
      <text:p text:style-name="P567">        readers_count--;</text:p>
      <text:p text:style-name="P568">        if (readers_count == 0) {</text:p>
      <text:p text:style-name="P569">            sem_post(&amp;rw_mutex);</text:p>
      <text:p text:style-name="P570">        }</text:p>
      <text:p text:style-name="P571">        sem_post(&amp;mutex);</text:p>
      <text:p text:style-name="P572"/>
      <text:p text:style-name="P573">        // Perform other tasks</text:p>
      <text:p text:style-name="P574">        usleep(1000);</text:p>
      <text:p text:style-name="P575">    }</text:p>
      <text:p text:style-name="P576">}</text:p>
      <text:p text:style-name="P577">void *writer(void *arg) {</text:p>
      <text:p text:style-name="P578">    while (1) {</text:p>
      <text:p text:style-name="P579">        sem_wait(&amp;rw_mutex);</text:p>
      <text:p text:style-name="P580">        // generate random string to be written to file</text:p>
      <text:p text:style-name="P581">        srand(time(NULL)); // Seed for random number generator</text:p>
      <text:p text:style-name="P582">        char randomString[STRING_LENGTH + 1]; // +1 for null terminator</text:p>
      <text:p text:style-name="P583">        for (int i = 0; i &lt; STRING_LENGTH; i++) {</text:p>
      <text:p text:style-name="P584">            randomString[i] = generateRandomChar();</text:p>
      <text:p text:style-name="P585">        }</text:p>
      <text:p text:style-name="P586">        randomString[STRING_LENGTH] = '\0'; // Null terminate the string</text:p>
      <text:p text:style-name="P587">        // Writing to file</text:p>
      <text:p text:style-name="P588">        fseek(file, 0, SEEK_END);</text:p>
      <text:p text:style-name="P589">        fprintf(file, "%s\n",randomString); // writer to file on drive</text:p>
      <text:p text:style-name="P590">        fprintf(stdout, "Writer %ld: %s\n", (long)arg, randomString); // display</text:p>
      <text:p text:style-name="P591">        fflush(file);</text:p>
      <text:p text:style-name="P592">        sem_post(&amp;rw_mutex);</text:p>
      <text:p text:style-name="P593">        // Perform other tasks</text:p>
      <text:p text:style-name="P594">        usleep(1000);</text:p>
      <text:p text:style-name="P595">    }</text:p>
      <text:p text:style-name="P596">}</text:p>
      <text:p text:style-name="P597"/>
      <text:p text:style-name="P598">int main() {</text:p>
      <text:p text:style-name="P599">    file = fopen("shared_file.txt", "a+");</text:p>
      <text:p text:style-name="P600">    if (file == NULL) {</text:p>
      <text:p text:style-name="P601">        perror("Error opening file");</text:p>
      <text:p text:style-name="P602">        exit(EXIT_FAILURE);</text:p>
      <text:p text:style-name="P603">    }</text:p>
      <text:p text:style-name="P604"/>
      <text:p text:style-name="P605">    sem_init(&amp;mutex, 0, 1);</text:p>
      <text:p text:style-name="P606">    sem_init(&amp;rw_mutex, 0, 1);</text:p>
      <text:p text:style-name="P607">    int i;</text:p>
      <text:p text:style-name="P608"/>
      <text:p text:style-name="P609">    for (i = 0; i &lt; NUM_WRITERS; i++) pthread_create(&amp;writers[i], NULL, writer, (void *)(long)i);</text:p>
      <text:p text:style-name="P610">    for (i = 0; i &lt; NUM_READERS; i++) pthread_create(&amp;readers[i], NULL, reader, (void *)(long)i);</text:p>
      <text:p text:style-name="P611"/>
      <text:p text:style-name="P612">    for (i = 0; i &lt; NUM_READERS; i++) pthread_join(readers[i], NULL);</text:p>
      <text:p text:style-name="P613">    for (i = 0; i &lt; NUM_WRITERS; i++) pthread_join(writers[i], NULL);</text:p>
      <text:p text:style-name="P614"/>
      <text:p text:style-name="P615">    fprintf(stdout, "reader pthread join completed\n");</text:p>
      <text:p text:style-name="P616">    sem_destroy(&amp;mutex);<text:s/></text:p>
      <text:p text:style-name="P617">    sem_destroy(&amp;rw_mutex);</text:p>
      <text:p text:style-name="P618">    fclose(file);</text:p>
      <text:p text:style-name="P619">    return 0;</text:p>
      <text:p text:style-name="Normal"><text:span text:style-name="T62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c445e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amveel Khan</meta:initial-creator>
    <dc:creator>cloudconvert_3</dc:creator>
    <meta:creation-date>2026-05-06T22:40:00Z</meta:creation-date>
    <dc:date>2026-05-06T21:45:00Z</dc:date>
    <meta:template xlink:href="Normal" xlink:type="simple"/>
    <meta:editing-cycles>1</meta:editing-cycles>
    <meta:editing-duration>PT300S</meta:editing-duration>
    <meta:document-statistic meta:page-count="1" meta:paragraph-count="26" meta:word-count="2003" meta:character-count="13400" meta:row-count="95" meta:non-whitespace-character-count="11423"/>
  </office:meta>
</office:document-meta>
</file>